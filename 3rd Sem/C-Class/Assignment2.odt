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P to input mxn order matrix and find the sum of all even and odd numbers</text:p>
      <text:p text:style-name="P1"/>
      <text:p text:style-name="P1">wap to generate fibonacci series 0,1,1,2,3,5,8,15,21,34 using function</text:p>
      <text:p text:style-name="P1"/>
      <text:p text:style-name="P1">wap to add two numbers using pointer</text:p>
      <text:p text:style-name="P1"/>
      <text:p text:style-name="P1">wap to swap two integers using pointer</text:p>
      <text:p text:style-name="P1"/>
      <text:p text:style-name="P1">wap in c to input 10 integer number in an array and calculate the average number among them</text:p>
      <text:p text:style-name="P1"/>
      <text:p text:style-name="P1">wap to input a number and check if it is even or odd using function</text:p>
      <text:p text:style-name="P1"/>
      <text:p text:style-name="P1">wap to sort n numbers in an array in ascending order</text:p>
      <text:p text:style-name="P1"/>
      <text:p text:style-name="P1">wap to find the factorial of an entered number using recursion</text:p>
      <text:p text:style-name="P1"/>
      <text:p text:style-name="P1">wap in C to calculate the sum of 5 different numbers using array</text:p>
      <text:p text:style-name="P1"/>
      <text:p text:style-name="P1">wap to find if given number is prime or not using function</text:p>
      <text:p text:style-name="P1"/>
      <text:p text:style-name="P1"/>
      <text:p text:style-name="P1"/>
      <text:p text:style-name="P1"/>
      <text:p text:style-name="P1">stucture and union</text:p>
      <text:p text:style-name="P1"><text:soft-page-break/></text:p>
      <text:p text:style-name="P1">wap in c using structure to display the name, address, roll no., marks and gender</text:p>
      <text:p text:style-name="P1"/>
      <text:p text:style-name="P1">wap in C to take input from user having Student_ID, Student_Name, Student_Address and display those Student_Name whose address is "Kathmandu" using structure</text:p>
      <text:p text:style-name="P1"/>
      <text:p text:style-name="P1">wap in C to store records of 20 employee and display the record in appropriate format.(data memebrs of the employee are id, name, and salary)</text:p>
      <text:p text:style-name="P1"/>
      <text:p text:style-name="P1">wap using structure to display name, address and salary of two employees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5T17:48:36.204971645</dc:date>
    <meta:editing-duration>PT5M57S</meta:editing-duration>
    <meta:editing-cycles>1</meta:editing-cycles>
    <meta:document-statistic meta:table-count="0" meta:image-count="0" meta:object-count="0" meta:page-count="2" meta:paragraph-count="15" meta:word-count="195" meta:character-count="1081" meta:non-whitespace-character-count="901"/>
    <meta:generator>LibreOffice/25.8.4.2$Linux_X86_64 LibreOffice_project/580$Build-2</meta:generator>
  </office:meta>
</office:document-meta>
</file>